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5.0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Gantt">
      <style:table-properties table:display="true" style:writing-mode="lr-tb"/>
    </style:style>
    <style:style style:name="ta2" style:family="table" style:master-page-name="PageStyle_5f_Curva_20_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8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2" table:number-columns-repeated="5" table:default-cell-style-name="ce7"/>
        <table:table-column table:style-name="co2" table:default-cell-style-name="ce11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Noviemb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vestigación y relevamiento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álisis de APIs y tecnologí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finición de requisitos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12"/>
          <table:table-cell table:number-columns-repeated="16376"/>
        </table:table-row>
        <table:table-row table:style-name="ro1">
          <table:table-cell office:value-type="string" calcext:value-type="string">
            <text:p>Diseño de interfaz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eño de la estructura del sistema</text:p>
          </table:table-cell>
          <table:table-cell table:style-name="ce5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3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Desarrollo de la página princip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arrollo del módulo de pilotos</text:p>
          </table:table-cell>
          <table:table-cell table:style-name="ce5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Desarrollo del módulo de equipo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sarrollo del módulo de circuitos</text:p>
          </table:table-cell>
          <table:table-cell table:style-name="ce5"/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13"/>
          <table:table-cell table:number-columns-repeated="2"/>
          <table:table-cell table:style-name="ce15"/>
          <table:table-cell table:number-columns-repeated="16373"/>
        </table:table-row>
        <table:table-row table:style-name="ro1">
          <table:table-cell office:value-type="string" calcext:value-type="string">
            <text:p>Integración de API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lementación de funcionalidades adicionales</text:p>
          </table:table-cell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Pruebas y corrección de error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cumentación final</text:p>
          </table:table-cell>
          <table:table-cell table:style-name="ce5"/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paración de la presentació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ega final</text:p>
          </table:table-cell>
          <table:table-cell table:style-name="ce6"/>
          <table:table-cell table:style-name="ce10" table:number-columns-repeated="5"/>
          <table:table-cell table:style-name="ce14" office:value-type="string" calcext:value-type="string">
            <text:p>X</text:p>
          </table:table-cell>
          <table:table-cell table:number-columns-repeated="16376"/>
        </table:table-row>
      </table:table>
      <table:table table:name="Curva S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9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vance acumulado (%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75" calcext:value-type="float">
            <text:p>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rva_20_S" style:display-name="PageStyle_Curva 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01T21:42:43</meta:creation-date>
    <dc:date>2026-06-01T20:20:24.932637087</dc:date>
    <meta:generator>LibreOffice/25.2.2.2$Linux_X86_64 LibreOffice_project/520$Build-2</meta:generator>
    <meta:editing-duration>PT6M45S</meta:editing-duration>
    <meta:editing-cycles>1</meta:editing-cycles>
    <meta:document-statistic meta:table-count="2" meta:cell-count="66" meta:object-count="0"/>
    <meta:user-defined meta:name="AppVersion">3.1</meta:user-defined>
  </office:meta>
</office:document-meta>
</file>